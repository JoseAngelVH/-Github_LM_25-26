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oppins" svg:font-family="Poppins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 style:master-page-name="Standard">
      <style:table-properties style:width="18.568cm" fo:margin-left="-0.007cm" fo:margin-top="0cm" fo:margin-bottom="0cm" style:page-number="auto" table:align="left" style:writing-mode="lr-tb"/>
    </style:style>
    <style:style style:name="Tabla1.A" style:family="table-column">
      <style:table-column-properties style:column-width="14.67cm"/>
    </style:style>
    <style:style style:name="Tabla1.B" style:family="table-column">
      <style:table-column-properties style:column-width="3.898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ffffff" fo:padding-left="0.018cm" fo:padding-right="0.018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018cm" fo:padding-right="0.018cm" fo:padding-top="0cm" fo:padding-bottom="0cm" fo:border="0.018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Text_20_body">
      <style:text-properties fo:font-variant="normal" fo:text-transform="none" fo:color="#1d2125" style:font-name="Poppins" fo:font-size="15pt" fo:letter-spacing="normal" fo:font-style="normal" fo:font-weight="normal" style:font-size-asian="16pt" style:font-size-complex="16pt"/>
    </style:style>
    <style:style style:name="P4" style:family="paragraph" style:parent-style-name="Text_20_body">
      <style:paragraph-properties fo:margin-left="0cm" fo:margin-right="0cm" fo:margin-top="0cm" fo:margin-bottom="0.212cm" fo:text-align="start" style:justify-single-word="false" fo:text-indent="0cm" style:auto-text-indent="false"/>
      <style:text-properties fo:font-variant="normal" fo:text-transform="none" fo:color="#1d2125" style:font-name="Poppins" fo:font-size="15pt" fo:letter-spacing="normal" fo:font-style="normal" fo:font-weight="normal"/>
    </style:style>
    <style:style style:name="P5" style:family="paragraph" style:parent-style-name="Text_20_body">
      <style:paragraph-properties fo:margin-left="2.498cm" fo:margin-right="0cm" fo:margin-top="0cm" fo:margin-bottom="0.212cm" fo:text-align="start" style:justify-single-word="false" fo:text-indent="0cm" style:auto-text-indent="false"/>
      <style:text-properties fo:font-variant="normal" fo:text-transform="none" fo:color="#1d2125" style:font-name="Poppins" fo:font-size="15pt" fo:letter-spacing="normal" fo:font-style="normal" fo:font-weight="normal"/>
    </style:style>
    <style:style style:name="T1" style:family="text">
      <style:text-properties style:font-name="Arial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INSTITUTO DE E.S. “PABLO RUIZ PICASSO”. Chiclana.</text:p>
            <text:p text:style-name="P2">CURSO: 2022/2023</text:p>
            <text:p text:style-name="P2">Ciclo Superior: 2ºA.S.I.R.</text:p>
            <text:p text:style-name="P2">Módulo: LM. JAVASCRIPT.</text:p>
            <text:p text:style-name="P2">2ª EVALUACIÓN.</text:p>
          </table:table-cell>
          <table:table-cell table:style-name="Tabla1.B1" office:value-type="string">
            <text:p text:style-name="P1">N º 4</text:p>
          </table:table-cell>
        </table:table-row>
      </table:table>
      <text:p text:style-name="Standard"/>
      <text:p text:style-name="P3">1.-) Se declaran valores enteros en una lista, por ejemplo [10, 22, 30, 45, 32, 200, 11, 4, 70]. <text:s/>Visualizar, cuantos múltiplos de 10 hay en la lista. En el ejemplo serían 4 (10, 30, 200 y 70). </text:p>
      <text:p text:style-name="P3"/>
      <text:p text:style-name="P4">2.-) Se declaran valores enteros en una lista [10, 22, 30, 45, 32, 200, 11, 4, 70] y dos valores enteros: numero1 y numero2.<text:line-break/> <text:s text:c="3"/>a) Cuántos valores del la lista están contenidos entre los valores numero1 y numero2, inclusive ambos. Por ejemplo: si los dos números son: 40 y 100, habrían dos valores.<text:line-break/> <text:s text:c="3"/>b) Visualizar los valores (el 45 y el 70).</text:p>
      <text:p text:style-name="P4"/>
      <text:p text:style-name="P4">3.-) Se declara una lista con valores numéricos. Por cada valor, visualizar su cuadrado. Para obtener el cuadrado, declarar una función (con su return correspondiente). </text:p>
      <text:p text:style-name="P4"><text:s/>Si lista es [2,3,4,8,5], los valores visualizados serán: 4, 9,16,64,25.</text:p>
      <text:p text:style-name="P4"/>
      <text:p text:style-name="P4">4.-) En una lista se guardan los login o nombres de usuarios (los que se quieran). En otra lista se guardan las correspondientes claves. Se pide:<text:line-break/> <text:s/>a) Dado un login y clave de un usuario por teclado, visualizar SI o NO está registrado, es decir, si su login está en la lista primera y su clave está en la lista segunda.</text:p>
      <text:p text:style-name="P4"><text:s text:c="2"/>Por ejemplo: lista_login = ["manu", "loli", "root", "usuario1"]<text:line-break/><text:tab/> <text:s text:c="14"/>lista_claves = ["1234", "loli200", "4256", "usuario1"]</text:p>
      <text:p text:style-name="P4"><text:s text:c="3"/>Si los datos del usuario son: login —&gt; "root" y clave —&gt; "4256" , se visualiza el mensaje: "el usuario SI está correctamente registrado".</text:p>
      <text:p text:style-name="P4"/>
      <text:p text:style-name="P4">5.-) <text:s/>Se declara una lista con valores numéricos. Visualizar las posiciones donde haya algún número negativo junto al valor correspondiente.</text:p>
      <text:p text:style-name="P4">Por ejemplo: lista = [10, -22, 30, 45, -32, 200, -11, 4, -70].</text:p>
      <text:p text:style-name="P4"><text:tab/>En este caso se visualiza:</text:p>
      <text:p text:style-name="P5">posición 1, valor -22</text:p>
      <text:p text:style-name="P5">posición 4, valor -32</text:p>
      <text:p text:style-name="P5">posición 6, valor -11</text:p>
      <text:p text:style-name="P5">posición 8, valor -70</text:p>
      <text:p text:style-name="P4"><text:soft-page-break/>6.-) En una lista se guardan los sueldos de los empleados. Visualizar cuantos ganan más de 2000 euros.</text:p>
      <text:p text:style-name="P4"/>
      <text:p text:style-name="P4">7.-) Se declaran dos <text:s/>listas con valores numéricos. Se pide visualizar los valores repetidos en ambas listas en la misma posición. Por ejemplo en:</text:p>
      <text:p text:style-name="P4"><text:tab/><text:tab/>lista1 = (3, 6, 7, 8, 9, 33)</text:p>
      <text:p text:style-name="P4"><text:tab/><text:tab/>lista2 = (3, 4, 7, 3, 9, 33)</text:p>
      <text:p text:style-name="Text_20_body"><text:tab/><text:span text:style-name="T1">La respuesta es 3, 7, 9 y 33.</text:span><text:line-break/></text:p>
      <text:p text:style-name="P4">8.-) Se declara una lista con valores numéricos. </text:p>
      <text:p text:style-name="P4"><text:tab/>a) Visualizar la media de los valores positivos</text:p>
      <text:p text:style-name="P4"><text:tab/>b) Visualizar la media de los valores negativos. </text:p>
      <text:p text:style-name="P4"/>
      <text:p text:style-name="P4">9.-) Se declara una lista con valores numéricos. </text:p>
      <text:p text:style-name="P4"><text:tab/>a) Visualizar la media de los valores situados en posiciones pares.</text:p>
      <text:p text:style-name="P4"><text:tab/>b) Visualizar la media de los valores situados en posiciones impares.</text:p>
      <text:p text:style-name="P4"/>
      <text:p text:style-name="P4">10.-) Se declara una lista con valores numéricos. </text:p>
      <text:p text:style-name="P4"><text:tab/>a) Visualizar los valores de la lista superiores a la media glob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oppins" svg:font-family="Poppins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-asian="Times New Roman1" style:font-name-complex="Times New Roman1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fo:orphans="2" fo:widows="2"/>
      <style:text-properties style:letter-kerning="true" style:font-name-asian="Times New Roman1" style:font-name-complex="Times New Roman1" style:language-complex="ar" style:country-complex="SA"/>
    </style:style>
    <style:style style:name="List" style:family="paragraph" style:parent-style-name="Text_20_body" style:default-outline-level="" style:list-style-name="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"/>
    </style:style>
    <style:style style:name="Descripción1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Mangal" style:font-style-complex="italic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default-outline-level="" style:list-style-name="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Subtitle" style:default-outline-level="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_20_11" style:display-name="Título 11" style:family="paragraph" style:parent-style-name="Heading" style:default-outline-level="1">
      <style:text-properties fo:font-weight="bold" style:font-weight-asian="bold" style:font-weight-complex="bold"/>
    </style:style>
    <style:style style:name="Título_20_21" style:display-name="Título 21" style:family="paragraph" style:parent-style-name="Heading" style:default-outline-level="2">
      <style:text-properties fo:font-style="italic" fo:font-weight="bold" style:font-style-asian="italic" style:font-weight-asian="bold" style:font-style-complex="italic" style:font-weight-complex="bold"/>
    </style:style>
    <style:style style:name="Título_20_31" style:display-name="Título 31" style:family="paragraph" style:parent-style-name="Heading" style:default-outline-level="3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orphans="2" fo:widows="2" fo:hyphenation-ladder-count="no-limit"/>
      <style:text-properties style:letter-kerning="true" style:font-name-asian="Times New Roman1" style:language-asian="es" style:country-asian="ES" style:font-name-complex="Times New Roman1" style:language-complex="ar" style:country-complex="SA" fo:hyphenate="tru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 fo:orphans="2" fo:widows="2"/>
      <style:text-properties style:font-name="Courier New" fo:font-size="10pt" style:letter-kerning="true" style:font-name-asian="NSimSun" style:font-size-asian="10pt" style:language-asian="ar" style:country-asian="SA" style:font-name-complex="Courier New" style:font-size-complex="10pt" style:language-complex="ar" style:country-complex="SA"/>
    </style:style>
    <style:style style:name="HTML_20_Preformatted" style:display-name="HTML Preformatted" style:family="paragraph" style:parent-style-name="Standard" style:default-outline-level="" style:list-style-name="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size="10pt" style:letter-kerning="true" style:font-name-asian="Times New Roman1" style:font-size-asian="10pt" style:language-asian="es" style:country-asian="ES" style:font-name-complex="Courier New2" style:font-size-complex="10pt" style:language-complex="ar" style:country-complex="SA" fo:hyphenate="tru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1z1" style:family="text">
      <style:text-properties style:font-name="Times New Roman" style:font-name-asian="Times New Roman1" style:font-name-complex="Times New Roman1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Times New Roman" style:font-name-asian="Times New Roman1" style:font-name-complex="Times New Roman1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Times New Roman" style:font-name-asian="Times New Roman1" style:font-name-complex="Times New Roman1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WW8Num8z1" style:family="text">
      <style:text-properties style:font-name="Courier New1" style:font-name-complex="Courier New2"/>
    </style:style>
    <style:style style:name="WW8Num8z2" style:family="text">
      <style:text-properties style:font-name="Wingdings" style:font-name-complex="Wingdings1"/>
    </style:style>
    <style:style style:name="WW8Num8z3" style:family="text">
      <style:text-properties style:font-name="Symbol" style:font-name-complex="Symbol1"/>
    </style:style>
    <style:style style:name="Texto_20_independiente_20_Car" style:display-name="Texto independiente Car" style:family="text" style:parent-style-name="Default_20_Paragraph_20_Font">
      <style:text-properties style:letter-kerning="true" style:font-name-asian="Times New Roman1" style:font-name-complex="Times New Roman1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1" fo:font-size="10pt" style:letter-kerning="true" style:font-name-asian="Times New Roman1" style:font-size-asian="10pt" style:language-asian="es" style:country-asian="ES" style:font-name-complex="Courier New2" style:font-size-complex="10pt" style:language-complex="ar" style:country-complex="SA"/>
    </style:style>
    <style:style style:name="simbol" style:family="text" style:parent-style-name="Default_20_Paragraph_20_Font"/>
    <style:style style:name="brackets" style:family="text" style:parent-style-name="Default_20_Paragraph_20_Font"/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fo:font-size="16pt" style:font-name-asian="Times New Roman1" style:font-size-asian="16pt" style:font-name-complex="Times New Roman1" style:font-size-complex="16pt"/>
    </style:style>
    <style:style style:name="ListLabel_20_3" style:display-name="ListLabel 3" style:family="text">
      <style:text-properties style:font-name-complex="Courier New2"/>
    </style:style>
    <style:style style:name="ListLabel_20_4" style:display-name="ListLabel 4" style:family="text">
      <style:text-properties style:font-name-complex="Wingdings1"/>
    </style:style>
    <style:style style:name="ListLabel_20_5" style:display-name="ListLabel 5" style:family="text">
      <style:text-properties style:font-name-complex="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8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INSTITUTO DE E</dc:title>
    <meta:initial-creator>Alberto</meta:initial-creator>
    <dc:creator>Alberto M</dc:creator>
    <meta:editing-cycles>12</meta:editing-cycles>
    <meta:creation-date>2021-10-27T08:26:00</meta:creation-date>
    <dc:date>2023-02-13T20:43:36</dc:date>
    <meta:editing-duration>PT1H52M53S</meta:editing-duration>
    <meta:generator>OpenOffice/4.1.7$Unix OpenOffice.org_project/417m1$Build-9800</meta:generator>
    <meta:document-statistic meta:table-count="1" meta:image-count="0" meta:object-count="0" meta:page-count="2" meta:paragraph-count="33" meta:word-count="448" meta:character-count="2613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